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c025" officeooo:paragraph-rsid="001fc025"/>
    </style:style>
    <style:style style:name="P2" style:family="paragraph" style:parent-style-name="Standard">
      <style:text-properties officeooo:rsid="0021b563" officeooo:paragraph-rsid="0021b563"/>
    </style:style>
    <style:style style:name="P3" style:family="paragraph" style:parent-style-name="Standard">
      <style:text-properties officeooo:rsid="0022ff91" officeooo:paragraph-rsid="0022ff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2ff91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2ff91"/>
    </style:style>
    <style:style style:name="T6" style:family="text">
      <style:text-properties style:text-line-through-style="solid" style:text-line-through-type="single" style:text-underline-style="none"/>
    </style:style>
    <style:style style:name="T7" style:family="text">
      <style:text-properties style:text-line-through-style="none" style:text-line-through-type="none" style:text-underline-style="none"/>
    </style:style>
    <style:style style:name="T8" style:family="text">
      <style:text-properties officeooo:rsid="0022ff91"/>
    </style:style>
    <style:style style:name="T9" style:family="text">
      <style:text-properties fo:font-style="italic" style:text-underline-style="none" officeooo:rsid="0022ff91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yties : Benutzer, <text:span text:style-name="T1">Konto</text:span>, Projekt, Kategorie, Kommentar</text:p>
      <text:p text:style-name="P1"/>
      <text:p text:style-name="P2">Attribute : <text:tab/>Benutzer{Name:varchar(50), <text:span text:style-name="T2">email:varchar(75),</text:span><text:span text:style-name="T4"> </text:span><text:span text:style-name="T7">profilbeschreibung:text</text:span>} </text:p>
      <text:p text:style-name="P2"><text:tab/><text:tab/><text:span text:style-name="T1">Konto</text:span>{<text:span text:style-name="T6">guthaben:decimal(10,2)</text:span>, geheimzahl:int}</text:p>
      <text:p text:style-name="P2"><text:tab/><text:tab/>Projekt {<text:span text:style-name="T2">kennungID : int, </text:span><text:span text:style-name="T4"><text:s/>titel:varchar(100), beschreibung, finanzierungslimit : <text:tab/><text:tab/><text:tab/><text:tab/>deciaml(10,2), </text:span><text:span text:style-name="T5">Status : „geschlossen / </text:span><text:span text:style-name="T9">offen</text:span><text:span text:style-name="T5">“</text:span>}</text:p>
      <text:p text:style-name="P2"><text:tab/><text:tab/>Kategorie{<text:span text:style-name="T8">KategorieI</text:span><text:span text:style-name="T3">d: int , </text:span><text:span text:style-name="T5">name, varchar(100), icon</text:span>}</text:p>
      <text:p text:style-name="P2"><text:tab/><text:tab/><text:span text:style-name="T8">Kommentar : {kommentarI</text:span><text:span text:style-name="T3">d: int, </text:span><text:span text:style-name="T5">textnachricht: text, erstellungsdatum: date, <text:tab/><text:tab/><text:tab/><text:tab/><text:tab/>Sichtbarkeit: „öffentlich/privat“</text:span><text:span text:style-name="T8">}</text:span></text:p>
      <text:p text:style-name="P2"/>
      <text:p text:style-name="P3">Beziehung: Benutzer → spendet{spendenbetrag: decimal (10,2), Spender} → Proej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3:06:24.270564714</meta:creation-date>
    <dc:date>2019-11-18T13:35:01.799247889</dc:date>
    <meta:editing-duration>PT7M57S</meta:editing-duration>
    <meta:editing-cycles>1</meta:editing-cycles>
    <meta:document-statistic meta:table-count="0" meta:image-count="0" meta:object-count="0" meta:page-count="1" meta:paragraph-count="7" meta:word-count="53" meta:character-count="574" meta:non-whitespace-character-count="508"/>
    <meta:generator>LibreOffice/5.1.6.2$Linux_X86_64 LibreOffice_project/10m0$Build-2</meta:generator>
  </office:meta>
</office:document-meta>
</file>